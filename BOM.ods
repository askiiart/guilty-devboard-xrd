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80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 needed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 to ord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257" calcext:value-type="float">
            <text:p>0.0257</text:p>
          </table:table-cell>
          <table:table-cell table:formula="of:=MAX([.B2];[.C2])" office:value-type="float" office:value="20" calcext:value-type="float">
            <text:p>20</text:p>
          </table:table-cell>
          <table:table-cell office:value-type="string" calcext:value-type="string">
            <text:p>https://www.lcsc.com/product-detail/C2912031.html</text:p>
          </table:table-cell>
          <table:table-cell table:formula="of:=[.E2]*[.D2]"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5" calcext:value-type="float">
            <text:p>0.025</text:p>
          </table:table-cell>
          <table:table-cell table:formula="of:=MAX([.B3];[.C3])" office:value-type="float" office:value="50" calcext:value-type="float">
            <text:p>50</text:p>
          </table:table-cell>
          <table:table-cell office:value-type="string" calcext:value-type="string">
            <text:p><text:a xlink:href="https://www.lcsc.com/product-detail/C525479.html" xlink:type="simple">https://www.lcsc.com/product-detail/C525479.html</text:a></text:p>
          </table:table-cell>
          <table:table-cell table:formula="of:=[.E3]*[.D3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MOSFET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34" calcext:value-type="float">
            <text:p>0.0434</text:p>
          </table:table-cell>
          <table:table-cell table:formula="of:=MAX([.B4];[.C4])" office:value-type="float" office:value="10" calcext:value-type="float">
            <text:p>10</text:p>
          </table:table-cell>
          <table:table-cell office:value-type="string" calcext:value-type="string">
            <text:p>htps://www.lcsc.com/product-detail/C41355091.html </text:p>
          </table:table-cell>
          <table:table-cell table:formula="of:=[.E4]*[.D4]"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018" calcext:value-type="float">
            <text:p>0.0018</text:p>
          </table:table-cell>
          <table:table-cell table:formula="of:=MAX([.B5];[.C5])" office:value-type="float" office:value="50" calcext:value-type="float">
            <text:p>50</text:p>
          </table:table-cell>
          <table:table-cell office:value-type="string" calcext:value-type="string">
            <text:p><text:a xlink:href="https://www.lcsc.com/product-detail/C2903664.html" xlink:type="simple">https://www.lcsc.com/product-detail/C2903664.html</text:a></text:p>
          </table:table-cell>
          <table:table-cell table:formula="of:=[.E5]*[.D5]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4.7uF ca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33" calcext:value-type="float">
            <text:p>0.0733</text:p>
          </table:table-cell>
          <table:table-cell table:formula="of:=MAX([.B6];[.C6])" office:value-type="float" office:value="10" calcext:value-type="float">
            <text:p>10</text:p>
          </table:table-cell>
          <table:table-cell office:value-type="string" calcext:value-type="string">
            <text:p><text:a xlink:href="https://www.lcsc.com/product-detail/C335103.html" xlink:type="simple">https://www.lcsc.com/product-detail/C335103.html</text:a></text:p>
          </table:table-cell>
          <table:table-cell table:formula="of:=[.E6]*[.D6]"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1pF ca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49" calcext:value-type="float">
            <text:p>0.0049</text:p>
          </table:table-cell>
          <table:table-cell table:formula="of:=MAX([.B7];[.C7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85893.html" xlink:type="simple">https://www.lcsc.com/product-detail/C85893.html</text:a></text:p>
          </table:table-cell>
          <table:table-cell table:formula="of:=[.E7]*[.D7]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.2uF cap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46" calcext:value-type="float">
            <text:p>0.0346</text:p>
          </table:table-cell>
          <table:table-cell table:formula="of:=MAX([.B8];[.C8])" office:value-type="float" office:value="50" calcext:value-type="float">
            <text:p>50</text:p>
          </table:table-cell>
          <table:table-cell office:value-type="string" calcext:value-type="string">
            <text:p><text:a xlink:href="https://www.lcsc.com/product-detail/C335106.html" xlink:type="simple">https://www.lcsc.com/product-detail/C335106.html</text:a></text:p>
          </table:table-cell>
          <table:table-cell table:formula="of:=[.E8]*[.D8]"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10uF ca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289" calcext:value-type="float">
            <text:p>0.0289</text:p>
          </table:table-cell>
          <table:table-cell table:formula="of:=MAX([.B9];[.C9])" office:value-type="float" office:value="20" calcext:value-type="float">
            <text:p>20</text:p>
          </table:table-cell>
          <table:table-cell office:value-type="string" calcext:value-type="string">
            <text:p><text:a xlink:href="https://www.lcsc.com/product-detail/C2903664.html" xlink:type="simple">https://www.lcsc.com/product-detail/C2903664.html</text:a></text:p>
          </table:table-cell>
          <table:table-cell table:formula="of:=[.E9]*[.D9]"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1.5pF ca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3" calcext:value-type="float">
            <text:p>0.003</text:p>
          </table:table-cell>
          <table:table-cell table:formula="of:=MAX([.B10];[.C10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284990.html" xlink:type="simple">https://www.lcsc.com/product-detail/C284990.html</text:a></text:p>
          </table:table-cell>
          <table:table-cell table:formula="of:=[.E10]*[.D10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2uF ca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522" calcext:value-type="float">
            <text:p>0.1522</text:p>
          </table:table-cell>
          <table:table-cell table:formula="of:=MAX([.B11];[.C11])" office:value-type="float" office:value="5" calcext:value-type="float">
            <text:p>5</text:p>
          </table:table-cell>
          <table:table-cell office:value-type="string" calcext:value-type="string">
            <text:p><text:a xlink:href="https://www.lcsc.com/product-detail/C7432764.html" xlink:type="simple">https://www.lcsc.com/product-detail/C7432764.html</text:a></text:p>
          </table:table-cell>
          <table:table-cell table:formula="of:=[.E11]*[.D11]"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470nF ca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57" calcext:value-type="float">
            <text:p>0.0057</text:p>
          </table:table-cell>
          <table:table-cell table:formula="of:=MAX([.B12];[.C12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326573.html" xlink:type="simple">https://www.lcsc.com/product-detail/C326573.html</text:a></text:p>
          </table:table-cell>
          <table:table-cell table:formula="of:=[.E12]*[.D12]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1.2pF ca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16" calcext:value-type="float">
            <text:p>0.0016</text:p>
          </table:table-cell>
          <table:table-cell table:formula="of:=MAX([.B13];[.C13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22374839.html" xlink:type="simple">https://www.lcsc.com/product-detail/C22374839.html</text:a></text:p>
          </table:table-cell>
          <table:table-cell table:formula="of:=[.E13]*[.D13]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3.3nF induc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73" calcext:value-type="float">
            <text:p>0.0073</text:p>
          </table:table-cell>
          <table:table-cell table:formula="of:=MAX([.B14];[.C14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98045.html" xlink:type="simple">https://www.lcsc.com/product-detail/C98045.html</text:a></text:p>
          </table:table-cell>
          <table:table-cell table:formula="of:=[.E14]*[.D14]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1.5uH inducto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11" calcext:value-type="float">
            <text:p>0.0111</text:p>
          </table:table-cell>
          <table:table-cell table:formula="of:=MAX([.B15];[.C15])" office:value-type="float" office:value="50" calcext:value-type="float">
            <text:p>50</text:p>
          </table:table-cell>
          <table:table-cell office:value-type="string" calcext:value-type="string">
            <text:p><text:a xlink:href="https://www.lcsc.com/product-detail/C2885839.html" xlink:type="simple">https://www.lcsc.com/product-detail/C2885839.html</text:a></text:p>
          </table:table-cell>
          <table:table-cell table:formula="of:=[.E15]*[.D15]"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4.7nH induc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99" calcext:value-type="float">
            <text:p>0.0099</text:p>
          </table:table-cell>
          <table:table-cell table:formula="of:=MAX([.B16];[.C16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86126.html" xlink:type="simple">https://www.lcsc.com/product-detail/C86126.html</text:a></text:p>
          </table:table-cell>
          <table:table-cell table:formula="of:=[.E16]*[.D16]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3.6nH inducto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322" calcext:value-type="float">
            <text:p>0.0322</text:p>
          </table:table-cell>
          <table:table-cell table:formula="of:=MAX([.B17];[.C17])" office:value-type="float" office:value="20" calcext:value-type="float">
            <text:p>20</text:p>
          </table:table-cell>
          <table:table-cell office:value-type="string" calcext:value-type="string">
            <text:p><text:a xlink:href="https://www.lcsc.com/product-detail/C237447.html" xlink:type="simple">https://www.lcsc.com/product-detail/C237447.html</text:a></text:p>
          </table:table-cell>
          <table:table-cell table:formula="of:=[.E17]*[.D17]"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4.7uH induc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971" calcext:value-type="float">
            <text:p>0.0971</text:p>
          </table:table-cell>
          <table:table-cell table:formula="of:=MAX([.B18];[.C18])" office:value-type="float" office:value="10" calcext:value-type="float">
            <text:p>10</text:p>
          </table:table-cell>
          <table:table-cell office:value-type="string" calcext:value-type="string">
            <text:p><text:a xlink:href="https://www.lcsc.com/product-detail/C114862.html" xlink:type="simple">https://www.lcsc.com/product-detail/C114862.html</text:a></text:p>
          </table:table-cell>
          <table:table-cell table:formula="of:=[.E18]*[.D18]"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1nH induc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29" calcext:value-type="float">
            <text:p>0.0029</text:p>
          </table:table-cell>
          <table:table-cell table:formula="of:=MAX([.B19];[.C19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46607389.html" xlink:type="simple">https://www.lcsc.com/product-detail/C46607389.html</text:a></text:p>
          </table:table-cell>
          <table:table-cell table:formula="of:=[.E19]*[.D19]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5.1k resisto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7" calcext:value-type="float">
            <text:p>0.0007</text:p>
          </table:table-cell>
          <table:table-cell table:formula="of:=MAX([.B20];[.C20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473460.html" xlink:type="simple">https://www.lcsc.com/product-detail/C473460.html</text:a></text:p>
          </table:table-cell>
          <table:table-cell table:formula="of:=[.E20]*[.D20]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470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6" calcext:value-type="float">
            <text:p>0.0006</text:p>
          </table:table-cell>
          <table:table-cell table:formula="of:=MAX([.B21];[.C21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55098274.html" xlink:type="simple">https://www.lcsc.com/product-detail/C55098274.html</text:a></text:p>
          </table:table-cell>
          <table:table-cell table:formula="of:=[.E21]*[.D21]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30 ohm resisto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8" calcext:value-type="float">
            <text:p>0.0008</text:p>
          </table:table-cell>
          <table:table-cell table:formula="of:=MAX([.B22];[.C22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320826.html" xlink:type="simple">https://www.lcsc.com/product-detail/C320826.html</text:a></text:p>
          </table:table-cell>
          <table:table-cell table:formula="of:=[.E22]*[.D22]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.0011</text:p>
          </table:table-cell>
          <table:table-cell table:formula="of:=MAX([.B23];[.C23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327392.html" xlink:type="simple">https://www.lcsc.com/product-detail/C327392.html</text:a></text:p>
          </table:table-cell>
          <table:table-cell table:formula="of:=[.E23]*[.D23]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1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table:formula="of:=MAX([.B24];[.C24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131396.html" xlink:type="simple">https://www.lcsc.com/product-detail/C131396.html</text:a></text:p>
          </table:table-cell>
          <table:table-cell table:formula="of:=[.E24]*[.D24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806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9" calcext:value-type="float">
            <text:p>0.0009</text:p>
          </table:table-cell>
          <table:table-cell table:formula="of:=MAX([.B25];[.C25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474840.html" xlink:type="simple">https://www.lcsc.com/product-detail/C474840.html</text:a></text:p>
          </table:table-cell>
          <table:table-cell table:formula="of:=[.E25]*[.D25]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M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6" calcext:value-type="float">
            <text:p>0.0006</text:p>
          </table:table-cell>
          <table:table-cell table:formula="of:=MAX([.B26];[.C26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138106.html" xlink:type="simple">https://www.lcsc.com/product-detail/C138106.html</text:a></text:p>
          </table:table-cell>
          <table:table-cell table:formula="of:=[.E26]*[.D26]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0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table:formula="of:=MAX([.B27];[.C27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138117.html" xlink:type="simple">https://www.lcsc.com/product-detail/C138117.html</text:a></text:p>
          </table:table-cell>
          <table:table-cell table:formula="of:=[.E27]*[.D27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220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7" calcext:value-type="float">
            <text:p>0.0007</text:p>
          </table:table-cell>
          <table:table-cell table:formula="of:=MAX([.B28];[.C28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55098180.html" xlink:type="simple">https://www.lcsc.com/product-detail/C55098180.html</text:a></text:p>
          </table:table-cell>
          <table:table-cell table:formula="of:=[.E28]*[.D28]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68k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7" calcext:value-type="float">
            <text:p>0.0007</text:p>
          </table:table-cell>
          <table:table-cell table:formula="of:=MAX([.B29];[.C29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55098221.html" xlink:type="simple">https://www.lcsc.com/product-detail/C55098221.html</text:a></text:p>
          </table:table-cell>
          <table:table-cell table:formula="of:=[.E29]*[.D29]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.2 ohm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23" calcext:value-type="float">
            <text:p>0.0023</text:p>
          </table:table-cell>
          <table:table-cell table:formula="of:=MAX([.B30];[.C30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138154.html" xlink:type="simple">https://www.lcsc.com/product-detail/C138154.html</text:a></text:p>
          </table:table-cell>
          <table:table-cell table:formula="of:=[.E30]*[.D30]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0 ohm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.0011</text:p>
          </table:table-cell>
          <table:table-cell table:formula="of:=MAX([.B31];[.C31])" office:value-type="float" office:value="100" calcext:value-type="float">
            <text:p>100</text:p>
          </table:table-cell>
          <table:table-cell office:value-type="string" calcext:value-type="string">
            <text:p><text:a xlink:href="https://www.lcsc.com/product-detail/C304517.html" xlink:type="simple">https://www.lcsc.com/product-detail/C304517.html</text:a></text:p>
          </table:table-cell>
          <table:table-cell table:formula="of:=[.E31]*[.D31]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GM40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table:formula="of:=MAX([.B32];[.C32])" office:value-type="float" office:value="1" calcext:value-type="float">
            <text:p>1</text:p>
          </table:table-cell>
          <table:table-cell office:value-type="string" calcext:value-type="string">
            <text:p>https://www.lcsc.com/product-detail/C5141336.html</text:p>
          </table:table-cell>
          <table:table-cell table:formula="of:=[.E32]*[.D32]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FH9261-G3JH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289" calcext:value-type="float">
            <text:p>0.0289</text:p>
          </table:table-cell>
          <table:table-cell table:formula="of:=MAX([.B33];[.C33])" office:value-type="float" office:value="20" calcext:value-type="float">
            <text:p>20</text:p>
          </table:table-cell>
          <table:table-cell office:value-type="string" calcext:value-type="string">
            <text:p><text:a xlink:href="https://www.lcsc.com/product-detail/C19273258.html" xlink:type="simple">https://www.lcsc.com/product-detail/C19273258.html</text:a></text:p>
          </table:table-cell>
          <table:table-cell table:formula="of:=[.E33]*[.D33]"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BD83070GWL-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98" calcext:value-type="float">
            <text:p>0.7198</text:p>
          </table:table-cell>
          <table:table-cell table:formula="of:=MAX([.B34];[.C34])" office:value-type="float" office:value="1" calcext:value-type="float">
            <text:p>1</text:p>
          </table:table-cell>
          <table:table-cell office:value-type="string" calcext:value-type="string">
            <text:p>https://www.lcsc.com/product-detail/C2071126.html</text:p>
          </table:table-cell>
          <table:table-cell table:formula="of:=[.E34]*[.D34]" office:value-type="float" office:value="0.7198" calcext:value-type="float">
            <text:p>0.7198</text:p>
          </table:table-cell>
        </table:table-row>
        <table:table-row table:style-name="ro1">
          <table:table-cell office:value-type="string" calcext:value-type="string">
            <text:p>32MHz cryst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837" calcext:value-type="float">
            <text:p>0.0837</text:p>
          </table:table-cell>
          <table:table-cell table:formula="of:=MAX([.B35];[.C35])" office:value-type="float" office:value="5" calcext:value-type="float">
            <text:p>5</text:p>
          </table:table-cell>
          <table:table-cell office:value-type="string" calcext:value-type="string">
            <text:p><text:a xlink:href="https://www.lcsc.com/product-detail/C2965582.html" xlink:type="simple">https://www.lcsc.com/product-detail/C2965582.html</text:a></text:p>
          </table:table-cell>
          <table:table-cell table:formula="of:=[.E35]*[.D35]" office:value-type="float" office:value="0.4185" calcext:value-type="float">
            <text:p>0.4185</text:p>
          </table:table-cell>
        </table:table-row>
        <table:table-row table:style-name="ro1">
          <table:table-cell office:value-type="string" calcext:value-type="string">
            <text:p>32.768kHz crys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98" calcext:value-type="float">
            <text:p>0.7798</text:p>
          </table:table-cell>
          <table:table-cell table:formula="of:=MAX([.B36];[.C36])" office:value-type="float" office:value="1" calcext:value-type="float">
            <text:p>1</text:p>
          </table:table-cell>
          <table:table-cell office:value-type="string" calcext:value-type="string">
            <text:p><text:a xlink:href="https://www.lcsc.com/product-detail/C7425462.html" xlink:type="simple">https://www.lcsc.com/product-detail/C7425462.html</text:a></text:p>
          </table:table-cell>
          <table:table-cell table:formula="of:=[.E36]*[.D36]" office:value-type="float" office:value="0.7798" calcext:value-type="float">
            <text:p>0.779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RF54LM20A-QGAA-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table:formula="of:=MAX([.B38];[.C38])" office:value-type="float" office:value="1" calcext:value-type="float">
            <text:p>1</text:p>
          </table:table-cell>
          <table:table-cell office:value-type="string" calcext:value-type="string">
            <text:p>https://mou.sr/44t4RAm</text:p>
          </table:table-cell>
          <table:table-cell table:formula="of:=[.E38]*[.D38]"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Amphenol 124019772112A (USB-C)</text:p>
          </table:table-cell>
          <table:table-cell table:number-columns-repeated="3"/>
          <table:table-cell table:formula="of:=MAX([.B39];[.C39])"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Amphenol-Commercial-Products/124019772112A?qs=OlC7AqGiEDmvQ2B4jeqfyg%3D%3D" xlink:type="simple">https://www.mouser.com/ProductDetail/Amphenol-Commercial-Products/124019772112A?qs=OlC7AqGiEDmvQ2B4jeqfyg%3D%3D</text:a></text:p>
          </table:table-cell>
          <table:table-cell table:formula="of:=[.E39]*[.D39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LCPCB</text:p>
          </table:table-cell>
          <table:table-cell table:number-columns-repeated="5"/>
          <table:table-cell table:style-name="ce1" office:value-type="currency" office:currency="USD" office:value="10.1" calcext:value-type="currency">
            <text:p>$10.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LCPCB shipping</text:p>
          </table:table-cell>
          <table:table-cell table:number-columns-repeated="4"/>
          <table:table-cell office:value-type="string" calcext:value-type="string">
            <text:p>Roughly</text:p>
          </table:table-cell>
          <table:table-cell table:style-name="ce1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LCSC shipping</text:p>
          </table:table-cell>
          <table:table-cell table:number-columns-repeated="5"/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Mouser shipping</text:p>
          </table:table-cell>
          <table:table-cell table:number-columns-repeated="5"/>
          <table:table-cell office:value-type="float" office:value="8.49" calcext:value-type="float">
            <text:p>8.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5"/>
          <table:table-cell table:formula="of:=SUM([.G2:.G46])" office:value-type="float" office:value="58.5061" calcext:value-type="float">
            <text:p>58.506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table:formula="of:=[.G47]*1.0825" office:value-type="float" office:value="63.33285325" calcext:value-type="float">
            <text:p>63.33285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Atkinson Hyperlegible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04:34:08.787064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02:41:07.372150881</meta:creation-date>
    <dc:date>2026-06-24T04:34:33.853903104</dc:date>
    <meta:editing-duration>PT54M19S</meta:editing-duration>
    <meta:editing-cycles>5</meta:editing-cycles>
    <meta:generator>LibreOffice/25.8.7.3$Linux_X86_64 LibreOffice_project/580$Build-3</meta:generator>
    <meta:document-statistic meta:table-count="1" meta:cell-count="276" meta:object-count="0"/>
  </office:meta>
</office:document-meta>
</file>